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5000002A03A196F4E.png" manifest:media-type="image/png"/>
  <manifest:file-entry manifest:full-path="Pictures/100000000000035B000002FC6AC08353.png" manifest:media-type="image/png"/>
  <manifest:file-entry manifest:full-path="Pictures/10000000000003530000034709C71E19.png" manifest:media-type="image/png"/>
  <manifest:file-entry manifest:full-path="Pictures/100000000000033F0000032A1C4509A7.png" manifest:media-type="image/png"/>
  <manifest:file-entry manifest:full-path="Pictures/100000000000033E000001B3105F5CBC.png" manifest:media-type="image/png"/>
  <manifest:file-entry manifest:full-path="Pictures/1000000000000363000000F512129639.png" manifest:media-type="image/png"/>
  <manifest:file-entry manifest:full-path="Pictures/10000000000003830000029DA5841655.png" manifest:media-type="image/png"/>
  <manifest:file-entry manifest:full-path="Pictures/100000000000036A00000369616FDBC3.png" manifest:media-type="image/png"/>
  <manifest:file-entry manifest:full-path="Pictures/100000000000034700000314AF48C6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608e" officeooo:paragraph-rsid="0010608e"/>
    </style:style>
    <style:style style:name="P2" style:family="paragraph" style:parent-style-name="Standard">
      <style:text-properties fo:language="en" fo:country="US" officeooo:rsid="0012306a" officeooo:paragraph-rsid="0012306a"/>
    </style:style>
    <style:style style:name="P3" style:family="paragraph" style:parent-style-name="Standard">
      <style:text-properties fo:language="en" fo:country="US" officeooo:rsid="00157cda" officeooo:paragraph-rsid="00157cda"/>
    </style:style>
    <style:style style:name="P4" style:family="paragraph" style:parent-style-name="Standard">
      <style:text-properties fo:language="en" fo:country="US" officeooo:rsid="001627b1" officeooo:paragraph-rsid="001627b1"/>
    </style:style>
    <style:style style:name="P5" style:family="paragraph" style:parent-style-name="Standard">
      <style:paragraph-properties fo:break-before="page"/>
      <style:text-properties fo:language="en" fo:country="US" officeooo:rsid="001627b1" officeooo:paragraph-rsid="001627b1"/>
    </style:style>
    <style:style style:name="P6" style:family="paragraph" style:parent-style-name="Standard">
      <style:paragraph-properties fo:break-before="page"/>
      <style:text-properties fo:language="en" fo:country="US" officeooo:rsid="001814e0" officeooo:paragraph-rsid="001814e0"/>
    </style:style>
    <style:style style:name="P7" style:family="paragraph" style:parent-style-name="Standard">
      <style:text-properties fo:language="en" fo:country="US" officeooo:rsid="001814e0" officeooo:paragraph-rsid="001814e0"/>
    </style:style>
    <style:style style:name="T1" style:family="text">
      <style:text-properties officeooo:rsid="0013cc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/>
      <text:p text:style-name="P1">My mother is a cosmetology. She works in a center aesthetic near to downtown Medellin. She does relaxing massages and therapeutic massages. His favorite hobbies are watching movies and spending time with our two dogs. </text:p>
      <text:p text:style-name="P1"/>
      <text:p text:style-name="P1">Task 2:</text:p>
      <text:p text:style-name="P2">My favorites products in D1 are Coffee, eggs, grated cheese, bacon and candy. The coffee is very nice, it is a little smooth and flavor to chocolate. The eggs are cheap <text:span text:style-name="T1">and if add grated cheese with eggs and a little beacon is the better breakfast to started the day.</text:span></text:p>
      <text:p text:style-name="P2"/>
      <text:p text:style-name="P3"/>
      <text:p text:style-name="P4">Answer exams:</text:p>
      <text:p text:style-name="P4"><draw:frame draw:style-name="fr1" draw:name="Imagen1" text:anchor-type="char" svg:x="0.071cm" svg:y="0.358cm" svg:width="17.59cm" svg:height="15.644cm" draw:z-index="0"><draw:image xlink:href="Pictures/100000000000035B000002FC6AC08353.png" xlink:type="simple" xlink:show="embed" xlink:actuate="onLoad" draw:mime-type="image/png"/></draw:frame></text:p>
      <text:p text:style-name="P4"/>
      <text:p text:style-name="P4"/>
      <text:p text:style-name="P4"><draw:frame draw:style-name="fr2" draw:name="Imagen2" text:anchor-type="char" svg:width="17.59cm" svg:height="14.122cm" draw:z-index="1"><draw:image xlink:href="Pictures/1000000000000345000002A03A196F4E.png" xlink:type="simple" xlink:show="embed" xlink:actuate="onLoad" draw:mime-type="image/png"/></draw:frame><text:soft-page-break/></text:p>
      <text:p text:style-name="P5"><draw:frame draw:style-name="fr2" draw:name="Imagen3" text:anchor-type="char" svg:width="17.59cm" svg:height="17.145cm" draw:z-index="2"><draw:image xlink:href="Pictures/100000000000033F0000032A1C4509A7.png" xlink:type="simple" xlink:show="embed" xlink:actuate="onLoad" draw:mime-type="image/png"/></draw:frame></text:p>
      <text:p text:style-name="P5"><draw:frame draw:style-name="fr1" draw:name="Imagen4" text:anchor-type="char" svg:x="0cm" svg:y="-0.981cm" svg:width="17.59cm" svg:height="9.218cm" draw:z-index="3"><draw:image xlink:href="Pictures/100000000000033E000001B3105F5CBC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n5" text:anchor-type="char" svg:width="17.59cm" svg:height="13.088cm" draw:z-index="4"><draw:image xlink:href="Pictures/10000000000003830000029DA5841655.png" xlink:type="simple" xlink:show="embed" xlink:actuate="onLoad" draw:mime-type="image/png"/></draw:frame></text:p>
      <text:p text:style-name="P4"><text:soft-page-break/></text:p>
      <text:p text:style-name="P4"><draw:frame draw:style-name="fr3" draw:name="Imagen6" text:anchor-type="char" svg:width="17.59cm" svg:height="17.341cm" draw:z-index="5"><draw:image xlink:href="Pictures/10000000000003530000034709C71E19.png" xlink:type="simple" xlink:show="embed" xlink:actuate="onLoad" draw:mime-type="image/png"/></draw:frame></text:p>
      <text:p text:style-name="P6"><draw:frame draw:style-name="fr1" draw:name="Imagen7" text:anchor-type="char" svg:x="0.24cm" svg:y="-0.711cm" svg:width="17.59cm" svg:height="4.969cm" draw:z-index="6"><draw:image xlink:href="Pictures/1000000000000363000000F51212963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8" text:anchor-type="char" svg:width="17.59cm" svg:height="17.568cm" draw:z-index="7"><draw:image xlink:href="Pictures/100000000000036A00000369616FDBC3.png" xlink:type="simple" xlink:show="embed" xlink:actuate="onLoad" draw:mime-type="image/png"/></draw:frame><text:soft-page-break/></text:p>
      <text:p text:style-name="P5"><draw:frame draw:style-name="fr3" draw:name="Imagen9" text:anchor-type="char" svg:width="17.59cm" svg:height="16.519cm" draw:z-index="8"><draw:image xlink:href="Pictures/100000000000034700000314AF48C6EA.png" xlink:type="simple" xlink:show="embed" xlink:actuate="onLoad" draw:mime-type="image/png"/></draw:frame><text:s text:c="4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8:04:17.500925100</meta:creation-date>
    <dc:date>2025-06-26T17:00:00.344750300</dc:date>
    <meta:editing-duration>PT1H39M48S</meta:editing-duration>
    <meta:editing-cycles>2</meta:editing-cycles>
    <meta:generator>LibreOffice/25.2.4.3$Windows_X86_64 LibreOffice_project/33e196637044ead23f5c3226cde09b47731f7e27</meta:generator>
    <meta:document-statistic meta:table-count="0" meta:image-count="9" meta:object-count="0" meta:page-count="8" meta:paragraph-count="6" meta:word-count="91" meta:character-count="516" meta:non-whitespace-character-count="425"/>
  </office:meta>
</office:document-meta>
</file>