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0bacd6" officeooo:paragraph-rsid="000bacd6" style:font-size-asian="15pt" style:font-size-complex="15pt"/>
    </style:style>
    <style:style style:name="P2" style:family="paragraph" style:parent-style-name="Standard">
      <style:text-properties style:font-name="Arial" fo:font-size="15pt" fo:font-weight="bold" officeooo:rsid="000bacd6" officeooo:paragraph-rsid="000bacd6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5pt" officeooo:paragraph-rsid="000bacd6" style:font-size-asian="15pt" style:font-size-complex="15pt"/>
    </style:style>
    <style:style style:name="P4" style:family="paragraph" style:parent-style-name="Standard">
      <style:text-properties fo:color="#030303" loext:opacity="100%" style:font-name="Arial" fo:font-size="15pt" fo:font-weight="bold" officeooo:rsid="000bacd6" officeooo:paragraph-rsid="000bacd6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030303" loext:opacity="100%" style:font-name="Arial" fo:font-size="15pt" officeooo:rsid="000bacd6" officeooo:paragraph-rsid="000bacd6" style:font-size-asian="15pt" style:font-size-complex="15pt"/>
    </style:style>
    <style:style style:name="P6" style:family="paragraph" style:parent-style-name="Standard">
      <style:text-properties style:font-name="Arial" fo:font-size="15pt" officeooo:rsid="000bacd6" officeooo:paragraph-rsid="000c45d8" style:font-size-asian="15pt" style:font-size-complex="15pt"/>
    </style:style>
    <style:style style:name="P7" style:family="paragraph" style:parent-style-name="Standard">
      <style:text-properties style:font-name="Arial" fo:font-size="15pt" officeooo:paragraph-rsid="000c45d8" style:font-size-asian="15pt" style:font-size-complex="15pt"/>
    </style:style>
    <style:style style:name="P8" style:family="paragraph" style:parent-style-name="Standard">
      <style:text-properties style:font-name="Arial" fo:font-size="15pt" officeooo:rsid="000c45d8" officeooo:paragraph-rsid="000c45d8" style:font-size-asian="15pt" style:font-size-complex="15pt"/>
    </style:style>
    <style:style style:name="P9" style:family="paragraph" style:parent-style-name="Standard">
      <style:text-properties style:font-name="Arial" fo:font-size="15pt" officeooo:rsid="000e24a7" officeooo:paragraph-rsid="000e24a7" style:font-size-asian="15pt" style:font-size-complex="15pt"/>
    </style:style>
    <style:style style:name="P10" style:family="paragraph" style:parent-style-name="Standard">
      <style:text-properties style:font-name="Arial" fo:font-size="15pt" officeooo:rsid="000fa7e1" officeooo:paragraph-rsid="000fa7e1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bacd6" style:font-weight-asian="bold" style:font-weight-complex="bold"/>
    </style:style>
    <style:style style:name="T4" style:family="text">
      <style:text-properties officeooo:rsid="000bacd6"/>
    </style:style>
    <style:style style:name="T5" style:family="text">
      <style:text-properties fo:color="#c5000b" loext:opacity="100%" officeooo:rsid="000bacd6"/>
    </style:style>
    <style:style style:name="T6" style:family="text">
      <style:text-properties fo:color="#030303" loext:opacity="100%" officeooo:rsid="000bacd6"/>
    </style:style>
    <style:style style:name="T7" style:family="text">
      <style:text-properties officeooo:rsid="000c4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:</text:span> Isabel cristina perez ruiz </text:p>
      <text:p text:style-name="P1"><text:span text:style-name="T1">cedula:</text:span> 1214748471</text:p>
      <text:p text:style-name="P1"><text:span text:style-name="T1">nacimiento</text:span>: 8/diciembre/1999</text:p>
      <text:p text:style-name="P2">Edad: <text:span text:style-name="T2">25 AÑOS </text:span></text:p>
      <text:p text:style-name="P1"><text:span text:style-name="T1">lugar nacimiento:</text:span> bello Antioquia</text:p>
      <text:p text:style-name="P1"><text:span text:style-name="T1">dirección: </text:span>carrera 37#68 – 02 </text:p>
      <text:p text:style-name="P2">teléfono: <text:span text:style-name="T2">2840035 <text:s text:c="4"/></text:span></text:p>
      <text:p text:style-name="P1"><text:span text:style-name="T1">celular</text:span>: 3006353006</text:p>
      <text:p text:style-name="P1"><text:span text:style-name="T1">correo: </text:span>isabelperezruiz08@gmail.com</text:p>
      <text:p text:style-name="P3"><text:span text:style-name="T3">- perfil profesional:</text:span><text:span text:style-name="T4"> </text:span>Capacidad de trabajo en equipo, responsabilidad y cumplimiento en la ejecución de las tareas asignadas, excelentes relaciones interpersonales, aprendizaje rápido de nuevas herramientas disponibles <text:span text:style-name="T5">(ya le agregas mas )</text:span></text:p>
      <text:p text:style-name="P4">formación profesional </text:p>
      <text:p text:style-name="P5">- BACHILLER ACADÉMICO Politécnico Mayor 2017</text:p>
      <text:p text:style-name="P3"><text:span text:style-name="T6">- A</text:span>UXILIAR EN SEGURIDAD Y SALUD EN EL TRABAJO CESDE 2021-2</text:p>
      <text:p text:style-name="P3">- <text:span text:style-name="T4">A</text:span>UXILIAR EN SALUD ORAL CENSA 2019</text:p>
      <text:p text:style-name="P3">- <text:span text:style-name="T4">AUXILIAR EN ENFERMERÍA <text:s/>EDESA 2025</text:span></text:p>
      <text:p text:style-name="P1">Experiencia: </text:p>
      <text:p text:style-name="P6">-Teleperformance </text:p>
      <text:p text:style-name="P6">Agente Asesora servicio al cliente </text:p>
      <text:p text:style-name="P6">1 año y medio </text:p>
      <text:p text:style-name="P6">43607000 </text:p>
      <text:p text:style-name="P7"><text:span text:style-name="T4">- </text:span><text:span text:style-name="T7">I</text:span>NORCA.</text:p>
      <text:p text:style-name="P7">Auxiliar de seguridad y salud en el trabajo. </text:p>
      <text:p text:style-name="P7">Asistente del líder de seguridad y salud en el trabajo con actividades tales como actualizaciones de planes de emergencia y apoyo de documentación SST. </text:p>
      <text:p text:style-name="P7">6 meses. </text:p>
      <text:p text:style-name="P7">271 64 50. </text:p>
      <text:p text:style-name="P8">- CUIDADORA ADULTOS MAYORES independiente </text:p>
      <text:p text:style-name="P8">acompañamiento en sus actividades diarias </text:p>
      <text:p text:style-name="P8">1 año </text:p>
      <text:p text:style-name="P8">- hospital general de medellin,</text:p>
      <text:p text:style-name="P8">Auxiliar en enfermería área urgencias </text:p>
      <text:p text:style-name="P8">6 meses <text:s/></text:p>
      <text:p text:style-name="P9">Referencias personales </text:p>
      <text:p text:style-name="P9">-Yessenia sanchez saldarriaga </text:p>
      <text:p text:style-name="P9">Auxiliar en gerontologia </text:p>
      <text:p text:style-name="P9"><text:soft-page-break/>independiente </text:p>
      <text:p text:style-name="P9">3015470678</text:p>
      <text:p text:style-name="P9">- Carlos Andrés león urrego</text:p>
      <text:p text:style-name="P9">funcionario publico </text:p>
      <text:p text:style-name="P9">policía nacional </text:p>
      <text:p text:style-name="P9">auxiliar enfermeria </text:p>
      <text:p text:style-name="P9">3212749918</text:p>
      <text:p text:style-name="P9">- Juan Fernando castrillon</text:p>
      <text:p text:style-name="P9">Enfermero </text:p>
      <text:p text:style-name="P9">HGM </text:p>
      <text:p text:style-name="P10">310 8435432 </text:p>
      <text:p text:style-name="P10">REFERENCIAS FAMILIARES </text:p>
      <text:p text:style-name="P10">Claudia Patricia Ruíz </text:p>
      <text:p text:style-name="P10">Cosmetóloga </text:p>
      <text:p text:style-name="P10">Madre </text:p>
      <text:p text:style-name="P10">284 00 35 – 318 318 26 80 </text:p>
      <text:p text:style-name="P10">Jhon Fredy Pérez Martínez </text:p>
      <text:p text:style-name="P10">Electricista </text:p>
      <text:p text:style-name="P10">Padre </text:p>
      <text:p text:style-name="P10">312 850 44 98 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3:05:52.705671800</meta:creation-date>
    <dc:date>2025-11-12T13:54:10.411592200</dc:date>
    <meta:editing-duration>PT4M27S</meta:editing-duration>
    <meta:editing-cycles>1</meta:editing-cycles>
    <meta:document-statistic meta:table-count="0" meta:image-count="0" meta:object-count="0" meta:page-count="2" meta:paragraph-count="54" meta:word-count="219" meta:character-count="1546" meta:non-whitespace-character-count="1335"/>
    <meta:generator>LibreOffice/25.2.6.2$Windows_X86_64 LibreOffice_project/729c5bfe710f5eb71ed3bbde9e06a6065e9c6c5d</meta:generator>
  </office:meta>
</office:document-meta>
</file>